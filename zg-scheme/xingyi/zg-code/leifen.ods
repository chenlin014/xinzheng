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6"/>
          <table:table-cell table:style-name="ce21"/>
          <table:table-cell table:style-name="ce5" table:number-columns-repeated="23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/>
          <table:table-cell table:style-name="ce21"/>
          <table:table-cell table:number-columns-repeated="8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韭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厶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齊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予</text:p>
          </table:table-cell>
          <table:table-cell table:style-name="ce12"/>
          <table:table-cell table:style-name="ce9"/>
          <table:table-cell table:style-name="ce12" office:value-type="string" calcext:value-type="string">
            <text:p>互</text:p>
          </table:table-cell>
          <table:table-cell table:style-name="ce9" office:value-type="string" calcext:value-type="string">
            <text:p>曲</text:p>
          </table:table-cell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 office:value-type="string" calcext:value-type="string">
            <text:p>茶</text:p>
          </table:table-cell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"/>
          <table:table-cell table:style-name="ce35"/>
          <table:table-cell table:style-name="ce4" table:number-columns-repeated="18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 office:value-type="string" calcext:value-type="string">
            <text:p>甫</text:p>
          </table:table-cell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州</text:p>
          </table:table-cell>
          <table:table-cell table:style-name="ce8" office:value-type="string" calcext:value-type="string">
            <text:p>益</text:p>
          </table:table-cell>
          <table:table-cell table:style-name="ce11"/>
          <table:table-cell table:style-name="ce8"/>
          <table:table-cell table:style-name="ce11" office:value-type="string" calcext:value-type="string">
            <text:p>肅</text:p>
          </table:table-cell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 office:value-type="string" calcext:value-type="string">
            <text:p>七</text:p>
          </table:table-cell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㠯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永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19" office:value-type="string" calcext:value-type="string">
            <text:p>半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分</text:p>
          </table:table-cell>
          <table:table-cell table:style-name="ce16" office:value-type="string" calcext:value-type="string">
            <text:p>勿</text:p>
          </table:table-cell>
          <table:table-cell table:style-name="ce11" office:value-type="string" calcext:value-type="string">
            <text:p>卯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云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原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 office:value-type="string" calcext:value-type="string">
            <text:p>𠂢</text:p>
          </table:table-cell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刃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 office:value-type="string" calcext:value-type="string">
            <text:p>函</text:p>
          </table:table-cell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 office:value-type="string" calcext:value-type="string">
            <text:p>𠁁</text:p>
          </table:table-cell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 office:value-type="string" calcext:value-type="string">
            <text:p>爵</text:p>
          </table:table-cell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"/>
          <table:table-cell table:style-name="ce21"/>
          <table:table-cell table:style-name="ce5"/>
          <table:table-cell table:style-name="ce21"/>
          <table:table-cell table:style-name="ce5" table:number-columns-repeated="3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 office:value-type="string" calcext:value-type="string">
            <text:p>兀</text:p>
          </table:table-cell>
          <table:table-cell table:style-name="ce8" office:value-type="string" calcext:value-type="string">
            <text:p>無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/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卝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元</text:p>
          </table:table-cell>
          <table:table-cell table:style-name="ce8" office:value-type="string" calcext:value-type="string">
            <text:p>夫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/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黃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尢</text:p>
          </table:table-cell>
          <table:table-cell table:style-name="ce9" office:value-type="string" calcext:value-type="string">
            <text:p>亦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堇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 office:value-type="string" calcext:value-type="string">
            <text:p>𡿺</text:p>
          </table:table-cell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 office:value-type="string" calcext:value-type="string">
            <text:p>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 office:value-type="string" calcext:value-type="string">
            <text:p>旡</text:p>
          </table:table-cell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己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欠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4"/>
          <table:table-cell table:style-name="ce21"/>
          <table:table-cell table:style-name="ce5" table:number-columns-repeated="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愛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9:40:06.099357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6-02T22:53:42.573300450</dc:date>
    <meta:editing-duration>P5DT3H29M55S</meta:editing-duration>
    <meta:editing-cycles>1832</meta:editing-cycles>
    <meta:generator>LibreOffice/26.2.3.2$Linux_X86_64 LibreOffice_project/620$Build-2</meta:generator>
    <meta:document-statistic meta:table-count="1" meta:cell-count="679" meta:object-count="0"/>
  </office:meta>
</office:document-meta>
</file>